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Bold" svg:font-family="Cambria-Bold"/>
    <style:font-face style:name="Cambria" svg:font-family="Cambria"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list-style-name="">
      <style:paragraph-properties style:text-autospace="none"/>
      <style:text-properties fo:color="#000000" style:text-position="0% 100%" style:font-name="Cambria" fo:font-size="12pt" style:text-underline-style="none" fo:font-weight="normal" style:font-name-asian="Cambria" style:font-size-asian="12pt" style:font-weight-asian="normal" style:font-name-complex="Cambria" style:font-size-complex="12pt" style:font-weight-complex="normal"/>
    </style:style>
    <style:style style:name="P2" style:family="paragraph" style:parent-style-name="Standard" style:list-style-name="">
      <style:paragraph-properties style:text-autospace="none"/>
      <style:text-properties fo:color="#000000" style:text-position="0% 100%" style:font-name="Cambria-Bold" fo:font-size="12pt" style:text-underline-style="none" fo:font-weight="bold" style:font-name-asian="Cambria-Bold" style:font-size-asian="12pt" style:font-weight-asian="bold" style:font-name-complex="Cambria-Bold" style:font-size-complex="12pt" style:font-weight-complex="bold"/>
    </style:style>
    <style:style style:name="P3" style:family="paragraph" style:parent-style-name="Standard" style:list-style-name="">
      <style:paragraph-properties style:text-autospace="none"/>
    </style:style>
    <style:style style:name="T1" style:family="text">
      <style:text-properties fo:color="#000000" style:text-position="0% 100%" style:font-name="Cambria" fo:font-size="12pt" style:text-underline-style="none" fo:font-weight="normal" style:font-name-asian="Cambria" style:font-size-asian="12pt" style:font-weight-asian="normal" style:font-name-complex="Cambria"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Kundenbeziehung optimieren</text:p>
      <text:p text:style-name="P1">Alle Mitglieder sehen Sie in der Kundenübersicht. Sie können die Stammdaten ihrer Mitglieder pflegen und Notizen hinterlegen. Außerdem sehen Sie immer wann der Kunde welche Dienstleistungen gebucht hat. </text:p>
      <text:p text:style-name="P1"/>
      <text:p text:style-name="P1"/>
      <text:p text:style-name="P2">Mitgliedschaften im Überblick</text:p>
      <text:p text:style-name="P1">Verwalten Sie Ihre Mitglieder und deren Laufzeitverträge. Egal ob Buchungslimitierungen oder Mitgliedsbeitragseinzug. Mit uns haben Sie Ihre Mitglieder immer im Blick. Sehen Sie alle gebuchten Termine und Kurse des Mitglieds. Weiterhin können Sie ganz einfach verkaufte 10er Karten verwalten und Laufzeitverträge stilllegen, zum Beispiel bei einem Krankheitsfall. Versenden Sie automatisch vorgefertigte Geburtstag E-Mails.</text:p>
      <text:p text:style-name="P1"/>
      <text:p text:style-name="P1"/>
      <text:p text:style-name="P2">Statistiken</text:p>
      <text:p text:style-name="P1">Lernen Sie Ihr Unternehmen, Ihre Kunden und Ihre Mitglieder noch besser kennen. Mit den Statistiken können Sie sich jederzeit einen Überblick verschaffen. Zum Beispiel wann sind die Stoßzeiten, wer bucht wann und wie oft, welche Dienstleistungen oder Kurse kommen besonders gut an. Alles wird graphisch ansprechend aufbereitet, so dass Sie die wesentlichen Informationen mit einem Blick entnehmen können.</text:p>
      <text:p text:style-name="P1"/>
      <text:p text:style-name="P2">Berichte</text:p>
      <text:p text:style-name="P1">Lassen Sie sich automatisch Berichte generieren. Sie wollen gerne morgens einen Bericht über Ihre Buchungen für den heutigen Tag? Kein Problem. Einfach den automatischen Buchungsreport aktivieren und Sie haben jeden Morgen eine Übersicht in Ihrem Postfach, die Sie auch direkt ausdrucken können.</text:p>
      <text:p text:style-name="P1"/>
      <text:p text:style-name="P1">Zahlung (SEPA), Rechnung-Verwaltung, Mahnungen Schreiben Sie Rechnungen, Angebote und Mahnungen mit einem Tool. Verwalten Sie mit unserer Lösung Eingangsrechungen und Lastschriften.</text:p>
      <text:p text:style-name="P1"/>
      <text:p text:style-name="P3"><text:span text:style-name="T1">Konkurrenz<text:line-break/> https://virtuagym.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Bold" svg:font-family="Cambria-Bold"/>
    <style:font-face style:name="Cambria" svg:font-family="Cambria"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yk Czubaty</meta:initial-creator>
    <meta:creation-date>2026-07-12T22:00:15</meta:creation-date>
    <meta:document-statistic meta:table-count="0" meta:image-count="0" meta:object-count="0" meta:page-count="1" meta:paragraph-count="10" meta:word-count="211" meta:character-count="1614"/>
    <dc:date>2026-07-12T22:01:19</dc:date>
    <dc:creator>Patryk Czubaty</dc:creator>
    <meta:editing-duration>PT1M5S</meta:editing-duration>
    <meta:editing-cycles>1</meta:editing-cycles>
    <meta:generator>OpenOffice/4.1.2$Unix OpenOffice.org_project/412m3$Build-9782</meta:generator>
  </office:meta>
</office:document-meta>
</file>